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7000000A2EF0690A73.png" manifest:media-type="image/png"/>
  <manifest:file-entry manifest:full-path="Pictures/10000001000006700000053CAA662C94.png" manifest:media-type="image/png"/>
  <manifest:file-entry manifest:full-path="Pictures/1000000100000670000006B0035A5520.png" manifest:media-type="image/png"/>
  <manifest:file-entry manifest:full-path="Pictures/10000001000006700000037E93E82164.png" manifest:media-type="image/png"/>
  <manifest:file-entry manifest:full-path="Pictures/10000001000006700000056249077018.png" manifest:media-type="image/png"/>
  <manifest:file-entry manifest:full-path="Pictures/1000000100000670000008BAADCD07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67af4" officeooo:paragraph-rsid="00167af4"/>
    </style:style>
    <style:style style:name="P2" style:family="paragraph" style:parent-style-name="Standard">
      <style:paragraph-properties fo:break-before="page"/>
      <style:text-properties officeooo:rsid="00167af4" officeooo:paragraph-rsid="00167a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311in" svg:y="0.1311in" svg:width="6.9252in" svg:height="9.3866in" draw:z-index="0"><draw:image xlink:href="Pictures/1000000100000670000008BAADCD0757.png" xlink:type="simple" xlink:show="embed" xlink:actuate="onLoad" draw:mime-type="image/png"/></draw:frame></text:p>
      <text:p text:style-name="P2"><draw:frame draw:style-name="fr2" draw:name="Image2" text:anchor-type="char" svg:width="6.9252in" svg:height="5.7902in" draw:z-index="1"><draw:image xlink:href="Pictures/100000010000067000000562490770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2" draw:name="Image3" text:anchor-type="char" svg:width="6.9252in" svg:height="3.7563in" draw:z-index="2"><draw:image xlink:href="Pictures/10000001000006700000037E93E82164.png" xlink:type="simple" xlink:show="embed" xlink:actuate="onLoad" draw:mime-type="image/png"/></draw:frame><text:s/></text:p>
      <text:p text:style-name="P1"><draw:frame draw:style-name="fr3" draw:name="Image4" text:anchor-type="char" svg:width="6.9252in" svg:height="7.1937in" draw:z-index="3"><draw:image xlink:href="Pictures/1000000100000670000006B0035A5520.png" xlink:type="simple" xlink:show="embed" xlink:actuate="onLoad" draw:mime-type="image/png"/></draw:frame><text:soft-page-break/></text:p>
      <text:p text:style-name="P2"><draw:frame draw:style-name="fr2" draw:name="Image5" text:anchor-type="char" svg:width="6.9252in" svg:height="5.6307in" draw:z-index="4"><draw:image xlink:href="Pictures/10000001000006700000053CAA662C94.png" xlink:type="simple" xlink:show="embed" xlink:actuate="onLoad" draw:mime-type="image/png"/></draw:frame></text:p>
      <text:p text:style-name="P2"><draw:frame draw:style-name="fr4" draw:name="Image6" text:anchor-type="char" svg:width="5.8744in" svg:height="9.289in" draw:z-index="5"><draw:image xlink:href="Pictures/100000010000067000000A2EF0690A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7af4" officeooo:paragraph-rsid="00167af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RAF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1:17:42.364530812</meta:creation-date>
    <meta:print-date>2026-03-18T11:27:20.739963477</meta:print-date>
    <meta:printed-by>PDF files</meta:printed-by>
    <dc:date>2026-03-18T15:57:34.263306040</dc:date>
    <meta:editing-duration>PT4H24M</meta:editing-duration>
    <meta:editing-cycles>1</meta:editing-cycles>
    <meta:document-statistic meta:table-count="0" meta:image-count="6" meta:object-count="0" meta:page-count="6" meta:paragraph-count="2" meta:word-count="1" meta:character-count="7" meta:non-whitespace-character-count="6"/>
    <meta:generator>LibreOffice/26.2.1.2$Linux_X86_64 LibreOffice_project/8399f6259d8c87f40e7255cdb3c9b958f5e08948</meta:generator>
  </office:meta>
</office:document-meta>
</file>