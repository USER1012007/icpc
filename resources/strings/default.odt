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8000003320333C4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6.4957in" draw:z-index="0"><draw:image xlink:href="Pictures/1000000100000368000003320333C4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9bbc1" officeooo:paragraph-rsid="0019bbc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EFAULT TEMPLAT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11:36:15.761695066</meta:creation-date>
    <meta:print-date>2026-03-18T11:36:44.591602121</meta:print-date>
    <meta:printed-by>PDF files</meta:printed-by>
    <dc:date>2026-03-18T15:58:08.756216760</dc:date>
    <meta:editing-duration>PT4H11M36S</meta:editing-duration>
    <meta:editing-cycles>1</meta:editing-cycles>
    <meta:document-statistic meta:table-count="0" meta:image-count="1" meta:object-count="0" meta:page-count="1" meta:paragraph-count="1" meta:word-count="2" meta:character-count="16" meta:non-whitespace-character-count="15"/>
    <meta:generator>LibreOffice/26.2.1.2$Linux_X86_64 LibreOffice_project/8399f6259d8c87f40e7255cdb3c9b958f5e08948</meta:generator>
  </office:meta>
</office:document-meta>
</file>